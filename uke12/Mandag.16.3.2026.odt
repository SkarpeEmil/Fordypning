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andag 3.16.2026</text:p>
      <text:p text:style-name="Normal"/>
      <text:p text:style-name="Normal">Jeg har satt opp min py fill og laget en screen med en quit loop sån at jeg kan luke screenen med å trykke på x og skall prøve å legge til et bild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0F4761"/>
    </style:style>
    <style:style style:name="Sterktsitat" style:display-name="Sterkt s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0F4761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mil André Maurdal Carlsen Eckbo</meta:initial-creator>
    <dc:creator>Emil André Maurdal Carlsen Eckbo</dc:creator>
    <meta:creation-date>2026-03-16T10:48:00Z</meta:creation-date>
    <dc:date>2026-03-16T10:49:00Z</dc:date>
    <meta:template xlink:href="Normal.dotm" xlink:type="simple"/>
    <meta:editing-cycles>1</meta:editing-cycles>
    <meta:editing-duration>PT60S</meta:editing-duration>
    <meta:document-statistic meta:page-count="1" meta:paragraph-count="1" meta:word-count="26" meta:character-count="165" meta:row-count="1" meta:non-whitespace-character-count="140"/>
  </office:meta>
</office:document-meta>
</file>